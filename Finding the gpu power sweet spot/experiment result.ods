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0.04mm"/>
    </style:style>
    <style:style style:name="co2" style:family="table-column">
      <style:table-column-properties fo:break-before="auto" style:column-width="32.56mm"/>
    </style:style>
    <style:style style:name="co3" style:family="table-column">
      <style:table-column-properties fo:break-before="auto" style:column-width="24.48mm"/>
    </style:style>
    <style:style style:name="co4" style:family="table-column">
      <style:table-column-properties fo:break-before="auto" style:column-width="17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ults" table:style-name="ta1">
        <table:shapes>
          <draw:frame draw:z-index="0" draw:style-name="gr1" draw:text-style-name="P1" svg:width="159.95mm" svg:height="89.88mm" svg:x="199.36mm" svg:y="52.46mm">
            <draw:object draw:notify-on-update-of-ranges="results.A2:results.A18 results.B1:results.B1 results.B2:results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5mm" svg:height="89.88mm" svg:x="50.92mm" svg:y="53.33mm">
            <draw:object draw:notify-on-update-of-ranges="results.A2:results.A18 results.E1:results.E1 results.E2:results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ock_mhz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vg_power_w</text:p>
          </table:table-cell>
          <table:table-cell office:value-type="string" calcext:value-type="string">
            <text:p>power/t/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.6630761456831" calcext:value-type="float">
            <text:p>25.6630761456831</text:p>
          </table:table-cell>
          <table:table-cell office:value-type="float" office:value="324.518876181298" calcext:value-type="float">
            <text:p>324.518876181298</text:p>
          </table:table-cell>
          <table:table-cell office:value-type="float" office:value="188.58" calcext:value-type="float">
            <text:p>188.58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.4497532267185" calcext:value-type="float">
            <text:p>27.4497532267185</text:p>
          </table:table-cell>
          <table:table-cell office:value-type="float" office:value="346.289456010746" calcext:value-type="float">
            <text:p>346.289456010746</text:p>
          </table:table-cell>
          <table:table-cell office:value-type="float" office:value="197.82" calcext:value-type="float">
            <text:p>197.82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9.3312727918655" calcext:value-type="float">
            <text:p>29.3312727918655</text:p>
          </table:table-cell>
          <table:table-cell office:value-type="float" office:value="366.886798745914" calcext:value-type="float">
            <text:p>366.886798745914</text:p>
          </table:table-cell>
          <table:table-cell office:value-type="float" office:value="206.28" calcext:value-type="float">
            <text:p>206.28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2575057085583" calcext:value-type="float">
            <text:p>31.2575057085583</text:p>
          </table:table-cell>
          <table:table-cell office:value-type="float" office:value="390.648120745783" calcext:value-type="float">
            <text:p>390.648120745783</text:p>
          </table:table-cell>
          <table:table-cell office:value-type="float" office:value="213.98" calcext:value-type="float">
            <text:p>213.98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.9788807205331" calcext:value-type="float">
            <text:p>32.9788807205331</text:p>
          </table:table-cell>
          <table:table-cell office:value-type="float" office:value="411.913023940884" calcext:value-type="float">
            <text:p>411.913023940884</text:p>
          </table:table-cell>
          <table:table-cell office:value-type="float" office:value="218.02" calcext:value-type="float">
            <text:p>218.02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4.8013421067981" calcext:value-type="float">
            <text:p>34.8013421067981</text:p>
          </table:table-cell>
          <table:table-cell office:value-type="float" office:value="432.758507638843" calcext:value-type="float">
            <text:p>432.758507638843</text:p>
          </table:table-cell>
          <table:table-cell office:value-type="float" office:value="225.79" calcext:value-type="float">
            <text:p>225.79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6.6232861400785" calcext:value-type="float">
            <text:p>36.6232861400785</text:p>
          </table:table-cell>
          <table:table-cell office:value-type="float" office:value="450.13708720383" calcext:value-type="float">
            <text:p>450.13708720383</text:p>
          </table:table-cell>
          <table:table-cell office:value-type="float" office:value="237.44" calcext:value-type="float">
            <text:p>237.44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8.2308944163626" calcext:value-type="float">
            <text:p>38.2308944163626</text:p>
          </table:table-cell>
          <table:table-cell office:value-type="float" office:value="471.233346185152" calcext:value-type="float">
            <text:p>471.233346185152</text:p>
          </table:table-cell>
          <table:table-cell office:value-type="float" office:value="240.96" calcext:value-type="float">
            <text:p>240.9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.9378917857262" calcext:value-type="float">
            <text:p>39.9378917857262</text:p>
          </table:table-cell>
          <table:table-cell office:value-type="float" office:value="497.962879130828" calcext:value-type="float">
            <text:p>497.962879130828</text:p>
          </table:table-cell>
          <table:table-cell office:value-type="float" office:value="246.71" calcext:value-type="float">
            <text:p>246.71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1.68632176738" calcext:value-type="float">
            <text:p>41.68632176738</text:p>
          </table:table-cell>
          <table:table-cell office:value-type="float" office:value="507.302075326672" calcext:value-type="float">
            <text:p>507.302075326672</text:p>
          </table:table-cell>
          <table:table-cell office:value-type="float" office:value="257.76" calcext:value-type="float">
            <text:p>257.76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3.2116151438735" calcext:value-type="float">
            <text:p>43.2116151438735</text:p>
          </table:table-cell>
          <table:table-cell office:value-type="float" office:value="522.755714670426" calcext:value-type="float">
            <text:p>522.755714670426</text:p>
          </table:table-cell>
          <table:table-cell office:value-type="float" office:value="267.56" calcext:value-type="float">
            <text:p>267.56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4.576406456946" calcext:value-type="float">
            <text:p>44.576406456946</text:p>
          </table:table-cell>
          <table:table-cell office:value-type="float" office:value="549.697666283544" calcext:value-type="float">
            <text:p>549.697666283544</text:p>
          </table:table-cell>
          <table:table-cell office:value-type="float" office:value="274.62" calcext:value-type="float">
            <text:p>274.6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6.2041062698141" calcext:value-type="float">
            <text:p>46.2041062698141</text:p>
          </table:table-cell>
          <table:table-cell office:value-type="float" office:value="550.991785213384" calcext:value-type="float">
            <text:p>550.991785213384</text:p>
          </table:table-cell>
          <table:table-cell office:value-type="float" office:value="280.11" calcext:value-type="float">
            <text:p>280.11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7.5693625524654" calcext:value-type="float">
            <text:p>47.5693625524654</text:p>
          </table:table-cell>
          <table:table-cell office:value-type="float" office:value="540.691101535235" calcext:value-type="float">
            <text:p>540.691101535235</text:p>
          </table:table-cell>
          <table:table-cell office:value-type="float" office:value="296.88" calcext:value-type="float">
            <text:p>296.88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8.5754048152799" calcext:value-type="float">
            <text:p>48.5754048152799</text:p>
          </table:table-cell>
          <table:table-cell office:value-type="float" office:value="575.283719470739" calcext:value-type="float">
            <text:p>575.283719470739</text:p>
          </table:table-cell>
          <table:table-cell office:value-type="float" office:value="318" calcext:value-type="float">
            <text:p>318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8.938652756083" calcext:value-type="float">
            <text:p>48.938652756083</text:p>
          </table:table-cell>
          <table:table-cell office:value-type="float" office:value="580.464723575663" calcext:value-type="float">
            <text:p>580.464723575663</text:p>
          </table:table-cell>
          <table:table-cell office:value-type="float" office:value="331.95" calcext:value-type="float">
            <text:p>331.95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9.1049011307189" calcext:value-type="float">
            <text:p>49.1049011307189</text:p>
          </table:table-cell>
          <table:table-cell office:value-type="float" office:value="586.270608300171" calcext:value-type="float">
            <text:p>586.270608300171</text:p>
          </table:table-cell>
          <table:table-cell office:value-type="float" office:value="366.67" calcext:value-type="float">
            <text:p>366.67</text:p>
          </table:table-cell>
          <table:table-cell office:value-type="float" office:value="7.47" calcext:value-type="float">
            <text:p>7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9:05:18.481569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1T19:08:31.891498680</dc:date>
    <meta:editing-duration>PT11M59S</meta:editing-duration>
    <meta:editing-cycles>2</meta:editing-cycles>
    <meta:generator>LibreOffice/26.2.1.2$Linux_X86_64 LibreOffice_project/8399f6259d8c87f40e7255cdb3c9b958f5e08948</meta:generator>
    <meta:document-statistic meta:table-count="1" meta:cell-count="9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20" chart:maximum="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12pt" style:letter-kerning="false" style:font-size-asian="9pt" style:font-size-complex="9pt"/>
    </style:style>
    <style:style style:name="T2" style:family="text">
      <style:text-properties fo:font-size="12pt" style:font-size-asian="9pt" style:font-size-complex="9pt"/>
    </style:style>
  </office:automatic-styles>
  <office:body>
    <office:chart>
      <chart:chart svg:width="15.996cm" svg:height="8.989cm" xlink:href=".." xlink:type="simple" chart:class="chart:scatter" chart:style-name="ch1">
        <chart:plot-area chart:style-name="ch2" svg:x="1.49cm" svg:y="0.179cm" svg:width="14.187cm" svg:height="7.49cm">
          <chart:coordinate-region svg:x="2.141cm" svg:y="0.381cm" svg:width="13.135cm" svg:height="6.635cm"/>
          <chart:axis chart:dimension="x" chart:name="primary-x" chart:style-name="ch3">
            <chart:title svg:x="6.319cm" svg:y="7.848cm" chart:style-name="ch4">
              <text:p><text:span text:style-name="T1">clock speed limit (MHz)</text:span></text:p>
            </chart:title>
            <chart:grid chart:style-name="ch5" chart:class="major"/>
          </chart:axis>
          <chart:axis chart:dimension="y" chart:name="primary-y" chart:style-name="ch6">
            <chart:title svg:x="0.451cm" svg:y="4.8cm" chart:style-name="ch7">
              <text:p><text:span text:style-name="T2">token / s</text:span></text:p>
            </chart:title>
            <chart:grid chart:style-name="ch5" chart:class="major"/>
          </chart:axis>
          <chart:series chart:style-name="ch8" chart:values-cell-range-address="results.B2:results.B18" chart:label-cell-address="results.B1:results.B1" chart:class="chart:scatter">
            <chart:domain table:cell-range-address="results.A2:results.A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/s</text:p>
                <draw:g>
                  <svg:desc>results.B1: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results.A2:results.A18</svg:desc>
                </draw:g>
              </table:table-cell>
              <table:table-cell office:value-type="float" office:value="25.6630761456831">
                <text:p>25.6630761456831</text:p>
                <draw:g>
                  <svg:desc>results.B2:results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0">
                <text:p>1300</text:p>
              </table:table-cell>
              <table:table-cell office:value-type="float" office:value="27.4497532267185">
                <text:p>27.4497532267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9.3312727918655">
                <text:p>29.3312727918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31.2575057085583">
                <text:p>31.2575057085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32.9788807205331">
                <text:p>32.9788807205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0">
                <text:p>1700</text:p>
              </table:table-cell>
              <table:table-cell office:value-type="float" office:value="34.8013421067981">
                <text:p>34.8013421067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">
                <text:p>1800</text:p>
              </table:table-cell>
              <table:table-cell office:value-type="float" office:value="36.6232861400785">
                <text:p>36.6232861400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">
                <text:p>1900</text:p>
              </table:table-cell>
              <table:table-cell office:value-type="float" office:value="38.2308944163626">
                <text:p>38.2308944163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9.9378917857262">
                <text:p>39.9378917857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41.68632176738">
                <text:p>41.68632176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43.2116151438735">
                <text:p>43.2116151438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0">
                <text:p>2300</text:p>
              </table:table-cell>
              <table:table-cell office:value-type="float" office:value="44.576406456946">
                <text:p>44.576406456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46.2041062698141">
                <text:p>46.2041062698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0">
                <text:p>2500</text:p>
              </table:table-cell>
              <table:table-cell office:value-type="float" office:value="47.5693625524654">
                <text:p>47.5693625524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0">
                <text:p>2600</text:p>
              </table:table-cell>
              <table:table-cell office:value-type="float" office:value="48.5754048152799">
                <text:p>48.5754048152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0">
                <text:p>2700</text:p>
              </table:table-cell>
              <table:table-cell office:value-type="float" office:value="48.938652756083">
                <text:p>48.938652756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0">
                <text:p>2800</text:p>
              </table:table-cell>
              <table:table-cell office:value-type="float" office:value="49.1049011307189">
                <text:p>49.1049011307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15.996cm" svg:height="8.989cm" xlink:href=".." xlink:type="simple" chart:class="chart:scatter" chart:style-name="ch1">
        <chart:plot-area chart:style-name="ch2" svg:x="1.49cm" svg:y="0.179cm" svg:width="14.187cm" svg:height="7.49cm">
          <chart:coordinate-region svg:x="2.241cm" svg:y="0.381cm" svg:width="13.034cm" svg:height="6.635cm"/>
          <chart:axis chart:dimension="x" chart:name="primary-x" chart:style-name="ch3">
            <chart:title svg:x="6.319cm" svg:y="7.848cm" chart:style-name="ch4">
              <text:p><text:span text:style-name="T1">clock speed limit (MHz)</text:span></text:p>
            </chart:title>
            <chart:grid chart:style-name="ch5" chart:class="major"/>
          </chart:axis>
          <chart:axis chart:dimension="y" chart:name="primary-y" chart:style-name="ch6">
            <chart:title svg:x="0.451cm" svg:y="6.141cm" chart:style-name="ch7">
              <text:p><text:span text:style-name="T1">token efficiency (W/t/s)</text:span></text:p>
            </chart:title>
            <chart:grid chart:style-name="ch5" chart:class="major"/>
          </chart:axis>
          <chart:series chart:style-name="ch8" chart:values-cell-range-address="results.E2:results.E18" chart:label-cell-address="results.E1:results.E1" chart:class="chart:scatter">
            <chart:domain table:cell-range-address="results.A2:results.A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er/t/s</text:p>
                <draw:g>
                  <svg:desc>results.E1: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results.A2:results.A18</svg:desc>
                </draw:g>
              </table:table-cell>
              <table:table-cell office:value-type="float" office:value="7.35">
                <text:p>7.35</text:p>
                <draw:g>
                  <svg:desc>results.E2:results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0">
                <text:p>1300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0">
                <text:p>17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">
                <text:p>1800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">
                <text:p>190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0">
                <text:p>2300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0">
                <text:p>2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0">
                <text:p>2600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0">
                <text:p>270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0">
                <text:p>2800</text:p>
              </table:table-cell>
              <table:table-cell office:value-type="float" office:value="7.47">
                <text:p>7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